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TableColumnWide" style:family="table-column" style:display-name="TableColumnWide">
      <style:table-column-properties style:column-width="2.35in"/>
    </style:style>
  </office:automatic-styles>
  <office:body>
    <office:text>
      <text:p text:style-name="TitleStyle">MYOH Replit Work Package</text:p>
      <text:p text:style-name="SubtitleStyle">Private Gary &amp; Sam build | Prepared 2026-05-13 | ODF/ODT package for Replit Agent work queue</text:p>
      <text:p text:style-name="NoteBlock">Purpose: Give Replit a clean, sequential set of work items to finish the practical MYOH app without drifting into commercial/SaaS work.</text:p>
      <text:h text:outline-level="1" text:style-name="Heading1Custom">1. Operating Rules for Replit</text:h>
      <text:p text:style-name="BodyCustom">- Run one queue item at a time. Do not paste the whole package as a single mega-prompt.</text:p>
      <text:p text:style-name="BodyCustom">- Do not rebuild or redesign the whole app unless explicitly instructed.</text:p>
      <text:p text:style-name="BodyCustom">- After each item, Replit must summarise changed files, errors, and anything deferred.</text:p>
      <text:p text:style-name="BodyCustom">- Keep this build scoped to Gary and Sam private household use only.</text:p>
      <text:p text:style-name="BodyCustom">- Commercial, soft-launch, SaaS, GPT publishing and pricing ideas are outside this work package.</text:p>
      <text:p text:style-name="BodyCustom">- MYOH/Replit remains the source of truth for household data, secrets, app state and exports.</text:p>
      <text:p text:style-name="BodyCustom">- Nothing should silently import, delete, overwrite or apply AI-suggested changes without review/confirm.</text:p>
      <text:p text:style-name="BodyCustom">- Shopping stays deferred until the money-management core is stable.</text:p>
      <text:h text:outline-level="1" text:style-name="Heading1Custom">2. Current State Snapshot</text:h>
      <table:table table:name="Table">
        <table:table-column table:style-name="TableColumnWide"/>
        <table:table-column table:style-name="TableColumnWide"/>
        <table:table-column table:style-name="TableColumnWide"/>
        <table:table-row>
          <table:table-cell>
            <text:p text:style-name="BodyCustom"><text:span>Area</text:span></text:p>
          </table:table-cell>
          <table:table-cell>
            <text:p text:style-name="BodyCustom"><text:span>Status</text:span></text:p>
          </table:table-cell>
          <table:table-cell>
            <text:p text:style-name="BodyCustom"><text:span>Notes</text:span></text:p>
          </table:table-cell>
        </table:table-row>
        <table:table-row>
          <table:table-cell>
            <text:p text:style-name="BodyCustom">Import/run/branding</text:p>
          </table:table-cell>
          <table:table-cell>
            <text:p text:style-name="BodyCustom">Complete</text:p>
          </table:table-cell>
          <table:table-cell>
            <text:p text:style-name="BodyCustom">App runs without Clerk/login for now; MYOH branding and routing are stable.</text:p>
          </table:table-cell>
        </table:table-row>
        <table:table-row>
          <table:table-cell>
            <text:p text:style-name="BodyCustom">JSON import/export/data</text:p>
          </table:table-cell>
          <table:table-cell>
            <text:p text:style-name="BodyCustom">Mostly complete</text:p>
          </table:table-cell>
          <table:table-cell>
            <text:p text:style-name="BodyCustom">Full JSON and section import/export exist; Settings/Data Management centralisation remains.</text:p>
          </table:table-cell>
        </table:table-row>
        <table:table-row>
          <table:table-cell>
            <text:p text:style-name="BodyCustom">Baseline household data</text:p>
          </table:table-cell>
          <table:table-cell>
            <text:p text:style-name="BodyCustom">Imported</text:p>
          </table:table-cell>
          <table:table-cell>
            <text:p text:style-name="BodyCustom">Scoped to Gary and Sam household budget/arrears plan only. No EGM/business creditors.</text:p>
          </table:table-cell>
        </table:table-row>
        <table:table-row>
          <table:table-cell>
            <text:p text:style-name="BodyCustom">Actual income</text:p>
          </table:table-cell>
          <table:table-cell>
            <text:p text:style-name="BodyCustom">Complete enough</text:p>
          </table:table-cell>
          <table:table-cell>
            <text:p text:style-name="BodyCustom">Income Sources are forecast; Actual Income Entries are actual received.</text:p>
          </table:table-cell>
        </table:table-row>
        <table:table-row>
          <table:table-cell>
            <text:p text:style-name="BodyCustom">Family Budget</text:p>
          </table:table-cell>
          <table:table-cell>
            <text:p text:style-name="BodyCustom">Mostly complete</text:p>
          </table:table-cell>
          <table:table-cell>
            <text:p text:style-name="BodyCustom">Safe-to-spend and household status exist; weekly/fortnightly/monthly summaries still open.</text:p>
          </table:table-cell>
        </table:table-row>
        <table:table-row>
          <table:table-cell>
            <text:p text:style-name="BodyCustom">Bills/Arrears/Cashflow</text:p>
          </table:table-cell>
          <table:table-cell>
            <text:p text:style-name="BodyCustom">Complete enough</text:p>
          </table:table-cell>
          <table:table-cell>
            <text:p text:style-name="BodyCustom">Supports dated bills, payments, part-payments, overdue and cashflow.</text:p>
          </table:table-cell>
        </table:table-row>
        <table:table-row>
          <table:table-cell>
            <text:p text:style-name="BodyCustom">Gig Work/DoorDash</text:p>
          </table:table-cell>
          <table:table-cell>
            <text:p text:style-name="BodyCustom">Complete</text:p>
          </table:table-cell>
          <table:table-cell>
            <text:p text:style-name="BodyCustom">Manual entry, km estimator, OCR review, settings defaults, income linking and double-count prevention are complete.</text:p>
          </table:table-cell>
        </table:table-row>
        <table:table-row>
          <table:table-cell>
            <text:p text:style-name="BodyCustom">Settings</text:p>
          </table:table-cell>
          <table:table-cell>
            <text:p text:style-name="BodyCustom">Mostly complete</text:p>
          </table:table-cell>
          <table:table-cell>
            <text:p text:style-name="BodyCustom">Controlled values, defaults, protect/delete/deactivate rules and audit scaffolding exist.</text:p>
          </table:table-cell>
        </table:table-row>
        <table:table-row>
          <table:table-cell>
            <text:p text:style-name="BodyCustom">Docs/Help</text:p>
          </table:table-cell>
          <table:table-cell>
            <text:p text:style-name="BodyCustom">Mostly complete</text:p>
          </table:table-cell>
          <table:table-cell>
            <text:p text:style-name="BodyCustom">Docs page covers 12 modules; inline help/tooltips and admin support notes remain.</text:p>
          </table:table-cell>
        </table:table-row>
        <table:table-row>
          <table:table-cell>
            <text:p text:style-name="BodyCustom">Tasks</text:p>
          </table:table-cell>
          <table:table-cell>
            <text:p text:style-name="BodyCustom">Not complete</text:p>
          </table:table-cell>
          <table:table-cell>
            <text:p text:style-name="BodyCustom">Needs full task-management upgrade next.</text:p>
          </table:table-cell>
        </table:table-row>
        <table:table-row>
          <table:table-cell>
            <text:p text:style-name="BodyCustom">Scenarios + AI assist</text:p>
          </table:table-cell>
          <table:table-cell>
            <text:p text:style-name="BodyCustom">Not complete</text:p>
          </table:table-cell>
          <table:table-cell>
            <text:p text:style-name="BodyCustom">High priority for Gary and Sam use.</text:p>
          </table:table-cell>
        </table:table-row>
      </table:table>
      <text:h text:outline-level="1" text:style-name="Heading1Custom">3. Do Not Work On Right Now</text:h>
      <text:p text:style-name="BodyCustom">- Do not build commercial/SaaS features in this private MYOH app queue.</text:p>
      <text:p text:style-name="BodyCustom">- Do not reintroduce Clerk/auth yet unless specifically approved.</text:p>
      <text:p text:style-name="BodyCustom">- Do not implement bank/email automatic ingestion yet.</text:p>
      <text:p text:style-name="BodyCustom">- Do not start Shopping until after Tasks, Scenarios, Settings/Data Management, and reporting clarity are stable.</text:p>
      <text:p text:style-name="BodyCustom">- Do not create new fake arrears or business creditors.</text:p>
      <text:h text:outline-level="1" text:style-name="Heading1Custom">4. Priority Work Queue</text:h>
      <text:p text:style-name="NoteBlock">Copy/paste one prompt at a time into the real MYOH Replit project. Each prompt is deliberately scoped.</text:p>
      <text:h text:outline-level="2" text:style-name="Heading2Custom">Queue Item 1 — Task Management Upgrade</text:h>
      <text:p text:style-name="BodyCustom">Risk: Medium</text:p>
      <text:p text:style-name="BodyCustom">Why this matters: Tasks need to become useful for weekly household execution, not just a simple on/off list.</text:p>
      <text:p text:style-name="CodeBlock">Implement Phase 7 Task Management only. Do not rebuild or redesign.<text:line-break/><text:line-break/>Replace the simple task/on-off model with a practical household task system. Tasks should support status, priority, due date, assigned person, category/bucket, notes, completion date, and links to bills, arrears, income entries, gig work, scenarios, and later shopping.<text:line-break/><text:line-break/>Required statuses: Not started, In progress, Waiting, Done, Deferred, Cancelled. Preserve existing stored enum values where needed and map labels safely if the database uses existing values.<text:line-break/><text:line-break/>Required priorities: Critical, High, Medium, Low. Preserve existing p1/p2/p3/critical storage where needed and use friendly labels in the UI.<text:line-break/><text:line-break/>Add task views or filters: Today, This week, Overdue, By person, By status, By category/bucket.<text:line-break/><text:line-break/>Use Settings lookup values where already safe for task bucket/status/priority. Do not break existing tasks. Run only necessary checks and summarise changed files/errors.</text:p>
      <text:h text:outline-level="2" text:style-name="Heading2Custom">Queue Item 2 — Scenarios + AI-Assisted Scenario Builder</text:h>
      <text:p text:style-name="BodyCustom">Risk: Medium</text:p>
      <text:p text:style-name="BodyCustom">Why this matters: Scenarios are directly useful for Gary and Sam: lower DoorDash, delayed bills, rent-first pressure weeks, or catch-up plans.</text:p>
      <text:p text:style-name="CodeBlock">Implement Phase 8 Scenarios plus the personal AI-assisted scenario helper. Do not rebuild or redesign.<text:line-break/><text:line-break/>Improve the Scenarios tab so Gary and Sam can model practical household outcomes. Required scenario types: lower DoorDash income, delayed bill, reduced groceries/incidentals, extra rent arrears payment, repair credit accepted, and pressure week.<text:line-break/><text:line-break/>Add a guided scenario builder UI. It can be rule-based for now, but should feel like AI guidance. Example prompts/shortcuts: “What if DoorDash is lower this week?”, “What if we delay this bill?”, “What if we pay extra rent arrears?”, “What if the repair credit is accepted?”.<text:line-break/><text:line-break/>Scenario outputs should show: weekly surplus/shortfall, safe-to-spend impact, bills delayed/paid, arrears/rent-plan impact, and suggested tasks/actions.<text:line-break/><text:line-break/>Do not apply any scenario to live budget data without a clear review/confirm step. Use the existing Help/Docs content as the guidance base where practical. Run only necessary checks and summarise changed files/errors.</text:p>
      <text:h text:outline-level="2" text:style-name="Heading2Custom">Queue Item 3 — Weekly Tracker Clarity and Actual-vs-Planned Review</text:h>
      <text:p text:style-name="BodyCustom">Risk: Low/Medium</text:p>
      <text:p text:style-name="BodyCustom">Why this matters: The weekly screen must be obvious during real use: what came in, what must be paid, what is left, and what to review.</text:p>
      <text:p text:style-name="CodeBlock">Improve Weekly Tracker clarity only. Do not rebuild or redesign.<text:line-break/><text:line-break/>The Weekly Tracker should be easy to use during a real household review. Add or refine clear sections: Forecast income, Actual income received, Bills due this week, Arrears/rent-plan payments, Essential spending, Notes/review checklist, and simple surplus/shortfall.<text:line-break/><text:line-break/>Use the rent-first model: Sam wages protect rent first; Gary DoorDash/work covers bills, fuel, food and incidentals. Show actual vs planned totals. Show the exact week/date range being reviewed. Link to actual income entry and bill payment actions where helpful.<text:line-break/><text:line-break/>Do not change Shopping. Do not duplicate Gig Work logic. Run only necessary checks and summarise changed files/errors.</text:p>
      <text:h text:outline-level="2" text:style-name="Heading2Custom">Queue Item 4 — Family Budget Summary Views and Report Dates</text:h>
      <text:p text:style-name="BodyCustom">Risk: Low/Medium</text:p>
      <text:p text:style-name="BodyCustom">Why this matters: Family Budget is mostly working, but it needs clearer time windows and summary views for real decision-making.</text:p>
      <text:p text:style-name="CodeBlock">Finish the Family Budget core reporting polish only. Do not rebuild or redesign.<text:line-break/><text:line-break/>Add weekly, fortnightly, and monthly summary views if practical. Every report/dashboard view must clearly show the exact date range being reported. Avoid vague “this week” labels without dates.<text:line-break/><text:line-break/>Use actual incomeEntries as received income and incomeSources only as forecast. Show planned vs actual by budget category. Confirm safe-to-spend uses actual income received minus essential bills due, rent/arrears commitments, planned essential spending, and buffer.<text:line-break/><text:line-break/>Show household status: Stable, Tight, Watch closely, Critical. Keep desktop layout intact and keep mobile readability in mind. Run only necessary checks and summarise changed files/errors.</text:p>
      <text:h text:outline-level="2" text:style-name="Heading2Custom">Queue Item 5 — Move Import/Export to Settings / Data Management</text:h>
      <text:p text:style-name="BodyCustom">Risk: Medium</text:p>
      <text:p text:style-name="BodyCustom">Why this matters: Settings should become the admin centre so import/export/backups are not scattered across operational screens.</text:p>
      <text:p text:style-name="CodeBlock">Finish Phase 9 export/import and backup basics only. Do not rebuild or redesign.<text:line-break/><text:line-break/>Move the main JSON import/export and all tab/section import/export controls into Settings as a Data Management or Import/Export tab. Settings should become the central place for full backup JSON, selected-section JSON import/export, CSV exports, import preview, import modes, and import/export history.<text:line-break/><text:line-break/>Confirm full JSON backup works. Add or confirm CSV exports for Family Budget, Bills, Income Sources, Actual Income Entries, Gig Work, Tasks, Arrears, Scenarios, and Budget Categories. Add import/export history using the existing audit log if practical.<text:line-break/><text:line-break/>Keep lightweight export buttons on individual tabs only if genuinely useful, but the primary controls should live in Settings. Do not add PDF summary yet unless trivial. Run only necessary checks and summarise changed files/errors.</text:p>
      <text:h text:outline-level="2" text:style-name="Heading2Custom">Queue Item 6 — Settings Wiring and Default Budget Assumptions</text:h>
      <text:p text:style-name="BodyCustom">Risk: Medium</text:p>
      <text:p text:style-name="BodyCustom">Why this matters: Settings exists, but remaining dropdowns and household defaults should be wired gradually and safely.</text:p>
      <text:p text:style-name="CodeBlock">Continue Settings wiring only where safe. Do not rebuild or redesign.<text:line-break/><text:line-break/>Already completed: controlled lookup values, system locks, deactivate-instead-of-delete when values are in use, default lookup support, and wiring into several high-value dropdowns.<text:line-break/><text:line-break/>Next, wire Settings lookup values into remaining safe dropdowns: income source type, payment method/account, task status/priority, arrears category/status/risk, gig payment status, and budget category group. Preserve existing enum values and validation.<text:line-break/><text:line-break/>Add default weekly budget assumptions in Settings for Gary and Sam use: default week start day, rent amount/frequency, grocery survival amount, grocery normal amount, fuel allowance, emergency buffer, and default planning horizon. Do not force these into calculations unless safe; expose them for later use if needed.<text:line-break/><text:line-break/>Run only necessary checks and summarise changed files/errors.</text:p>
      <text:h text:outline-level="2" text:style-name="Heading2Custom">Queue Item 7 — BNPL / Afterpay and Stored Value Tracker</text:h>
      <text:p text:style-name="BodyCustom">Risk: Medium</text:p>
      <text:p text:style-name="BodyCustom">Why this matters: Afterpay should be tracked as a repayment plan rather than only a normal bill; gift cards/stored value should avoid double-counting cash.</text:p>
      <text:p text:style-name="CodeBlock">Implement Phase 13 BNPL/payday loan and stored-value basics only. Do not rebuild or redesign.<text:line-break/><text:line-break/>Add a simple BNPL/loan tracker for Afterpay and similar repayment plans. Track provider, purchase/description, original amount, remaining balance, instalment amount, frequency, next payment date, status, fees/missed-payment risk, and linked budget category. Treat Afterpay as a repayment plan, not only an ordinary bill.<text:line-break/><text:line-break/>Add a simple gift card/stored-value tracker. Track provider/store, starting value, remaining balance, purchase/received date, expiry, notes, and linked budget category. Stored value should be available as a resource without double-counting cash.<text:line-break/><text:line-break/>Integrate repayment due amounts into Weekly Tracker and Family Budget where safe. Keep UI simple. Run only necessary checks and summarise changed files/errors.</text:p>
      <text:h text:outline-level="2" text:style-name="Heading2Custom">Queue Item 8 — Mobile Dashboard and Report Viewing Pass</text:h>
      <text:p text:style-name="BodyCustom">Risk: Low/Medium</text:p>
      <text:p text:style-name="BodyCustom">Why this matters: Gary and Sam need to check the app on phone screens without horizontal scrolling or unreadable report tables.</text:p>
      <text:p text:style-name="CodeBlock">Do a mobile dashboard/report viewing pass for MYOH. Do not redesign desktop and do not rebuild the app.<text:line-break/><text:line-break/>Target devices: Gary's Google Pixel 9 and Sam's iPhone 14/iPhone 14-class device. Treat this as a modern-phone responsive pass, not a single-device-only pass.<text:line-break/><text:line-break/>Prioritise reporting and review screens, not every input form. Gig Work has already had a dedicated mobile/OCR workflow pass, so exclude Gig Work unless a regression appears.<text:line-break/><text:line-break/>Required mobile priorities: Main Dashboard, Family Budget Dashboard, Weekly Tracker review view, Income &amp; Bills summary, Arrears/Rent Plan summary, and Scenarios comparison/summary.<text:line-break/><text:line-break/>Ensure no horizontal scrolling; report tables collapse to stacked cards or readable blocks; dashboard cards are compact and clear; safe-to-spend, income, bills due, arrears/rent-plan payments, warnings, and household status are visible and easy to read; primary review actions are easy to tap. Keep desktop layout intact. Run only necessary checks and summarise changed files/errors.</text:p>
      <text:h text:outline-level="2" text:style-name="Heading2Custom">Queue Item 9 — Inline Help and Admin Troubleshooting Notes</text:h>
      <text:p text:style-name="BodyCustom">Risk: Low</text:p>
      <text:p text:style-name="BodyCustom">Why this matters: Docs are good, but key screens should have lightweight help at the point of use.</text:p>
      <text:p text:style-name="CodeBlock">Finish the practical Help/Docs gaps only. Do not rebuild or redesign.<text:line-break/><text:line-break/>Add inline help/tooltips to key screens where the user can get confused: Actual Income Entries, Weekly Tracker, Family Budget safe-to-spend, Bills dueDate vs dueDay, Arrears/rent-plan status, Scenarios, Settings/Data Management, and Gig Work OCR review.<text:line-break/><text:line-break/>Add an Admin/Troubleshooting docs section covering: import failed, duplicate data, replace selected section, lookup value deactivated instead of deleted, missing dashboard totals, gig payout double-counting, OCR uncertain values, and how to create a clean backup.<text:line-break/><text:line-break/>Keep language plain and practical for Gary and Sam. Run only necessary checks and summarise changed files/errors.</text:p>
      <text:h text:outline-level="2" text:style-name="Heading2Custom">Queue Item 10 — Shopping Last</text:h>
      <text:p text:style-name="BodyCustom">Risk: Medium</text:p>
      <text:p text:style-name="BodyCustom">Why this matters: Shopping is useful, but it should come after the budget/weekly/scenario workflow is stable.</text:p>
      <text:p text:style-name="CodeBlock">Implement Phase 10 Shopping only after the money-management core is stable. Do not rebuild or redesign.<text:line-break/><text:line-break/>Improve Shopping as a master household shopping list plus weekly checklist. Group by Aldi, Woolworths, Heart and Soul/local, Buy where best, Household supplies, Other. Add estimated vs actual totals, bought/not bought, needed-this-week, and link shopping spend to Family Budget categories.<text:line-break/><text:line-break/>Use the existing master shopping list data as reference, but do not force every item into the active weekly budget. Add shopping CSV export. Run only necessary checks and summarise changed files/errors.</text:p>
      <text:h text:outline-level="1" text:style-name="Heading1Custom">5. Acceptance Checks After Each Queue Item</text:h>
      <text:p text:style-name="BodyCustom">- App still opens and existing routes still load.</text:p>
      <text:p text:style-name="BodyCustom">- No unrelated features were redesigned or rebuilt.</text:p>
      <text:p text:style-name="BodyCustom">- No commercial/SaaS language added to the private app.</text:p>
      <text:p text:style-name="BodyCustom">- No household data silently overwritten or deleted.</text:p>
      <text:p text:style-name="BodyCustom">- Summary includes changed files, any migrations, checks run, and remaining gaps.</text:p>
      <text:p text:style-name="BodyCustom">- If a migration is added, confirm it was applied successfully before moving on.</text:p>
      <text:p text:style-name="BodyCustom">- If data is imported/changed, export a backup JSON afterwards.</text:p>
      <text:h text:outline-level="1" text:style-name="Heading1Custom">6. Pause Conditions</text:h>
      <text:p text:style-name="WarnBlock">If any of these happen, stop and ask Gary/ChatGPT before continuing:</text:p>
      <text:p text:style-name="BodyCustom">- Replit suggests rebuilding from scratch.</text:p>
      <text:p text:style-name="BodyCustom">- A prompt would require auth, secrets, bank/email access, or commercial user data.</text:p>
      <text:p text:style-name="BodyCustom">- A migration might delete or rewrite existing household data.</text:p>
      <text:p text:style-name="BodyCustom">- The app starts mixing business/EGM/Brighter Group creditors into household records.</text:p>
      <text:p text:style-name="BodyCustom">- The implementation would make GPT store household data instead of MYOH/Replit.</text:p>
      <text:h text:outline-level="1" text:style-name="Heading1Custom">7. Save / Backup Routine</text:h>
      <text:p text:style-name="BodyCustom">- After every two successful queue items, export a full MYOH JSON backup.</text:p>
      <text:p text:style-name="BodyCustom">- Save the backup to the MYOH Drive folder and/or download locally.</text:p>
      <text:p text:style-name="BodyCustom">- Keep the latest clean baseline separate from test/demo/commercial datasets.</text:p>
      <text:p text:style-name="BodyCustom">- If a queue item touches import/export, immediately test a small export and import preview.</text:p>
      <text:h text:outline-level="1" text:style-name="Heading1Custom">8. Notes for ChatGPT Follow-up</text:h>
      <text:p text:style-name="BodyCustom">After each Replit run, paste the Replit summary back into ChatGPT. ChatGPT will update the phase tracker, decide whether to proceed, and prepare any new prompts or cleanup JSON needed.</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style:style style:name="TitleStyle" style:family="paragraph" style:display-name="TitleStyle">
      <style:text-properties fo:font-size="20pt" fo:font-weight="bold" fo:color="#1F2937"/>
    </style:style>
    <style:style style:name="SubtitleStyle" style:family="paragraph" style:display-name="SubtitleStyle">
      <style:text-properties fo:font-size="11pt" fo:color="#4B5563"/>
    </style:style>
    <style:style style:name="Heading1Custom" style:family="paragraph" style:display-name="Heading1Custom">
      <style:text-properties fo:font-size="16pt" fo:font-weight="bold" fo:color="#111827"/>
      <style:paragraph-properties fo:margin-top="0.25in" fo:margin-bottom="0.08in"/>
    </style:style>
    <style:style style:name="Heading2Custom" style:family="paragraph" style:display-name="Heading2Custom">
      <style:text-properties fo:font-size="13pt" fo:font-weight="bold" fo:color="#1F2937"/>
      <style:paragraph-properties fo:margin-top="0.18in" fo:margin-bottom="0.06in"/>
    </style:style>
    <style:style style:name="BodyCustom" style:family="paragraph" style:display-name="BodyCustom">
      <style:text-properties fo:font-size="10.5pt" fo:color="#111827"/>
      <style:paragraph-properties fo:margin-bottom="0.05in"/>
    </style:style>
    <style:style style:name="CodeBlock" style:family="paragraph" style:display-name="CodeBlock">
      <style:text-properties fo:font-family="Courier New" fo:font-size="9pt" fo:color="#111827"/>
      <style:paragraph-properties fo:background-color="#F3F4F6" fo:padding="0.06in" fo:border="0.5pt solid #D1D5DB" fo:margin-bottom="0.1in"/>
    </style:style>
    <style:style style:name="NoteBlock" style:family="paragraph" style:display-name="NoteBlock">
      <style:text-properties fo:font-size="10pt" fo:color="#1F2937"/>
      <style:paragraph-properties fo:background-color="#EFF6FF" fo:padding="0.06in" fo:border="0.5pt solid #93C5FD" fo:margin-bottom="0.08in"/>
    </style:style>
    <style:style style:name="WarnBlock" style:family="paragraph" style:display-name="WarnBlock">
      <style:text-properties fo:font-size="10pt" fo:color="#7C2D12"/>
      <style:paragraph-properties fo:background-color="#FFF7ED" fo:padding="0.06in" fo:border="0.5pt solid #FDBA74" fo:margin-bottom="0.08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